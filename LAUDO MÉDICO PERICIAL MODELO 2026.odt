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0ae9" officeooo:paragraph-rsid="001b0ae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1c971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paragraph-rsid="001e195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20a3c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2210e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25bf5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29e78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36869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paragraph-rsid="001e195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paragraph-rsid="0020006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paragraph-rsid="002210e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9e783" officeooo:paragraph-rsid="0029e78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9e783" officeooo:paragraph-rsid="002b4f1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9e783" officeooo:paragraph-rsid="002f249b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fa343" officeooo:paragraph-rsid="002fa34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2fed71" officeooo:paragraph-rsid="002fed71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2fed71" officeooo:paragraph-rsid="00335f3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335f33" officeooo:paragraph-rsid="00335f3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35195f" officeooo:paragraph-rsid="0035195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36869a" officeooo:paragraph-rsid="0036869a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fo:font-weight="bold" officeooo:rsid="0036f51f" officeooo:paragraph-rsid="0036f51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paragraph-rsid="0035195f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paragraph-rsid="002210e5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2fed71" officeooo:paragraph-rsid="00335f33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2fa343" officeooo:paragraph-rsid="002fa343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normal" officeooo:rsid="0029e783" officeooo:paragraph-rsid="002f249b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weight="normal" officeooo:rsid="0029e783" officeooo:paragraph-rsid="002b4f1a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weight="normal" officeooo:paragraph-rsid="0025bf5d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36f51f"/>
    </style:style>
    <style:style style:name="T1" style:family="text">
      <style:text-properties officeooo:rsid="0026d463"/>
    </style:style>
    <style:style style:name="T2" style:family="text">
      <style:text-properties officeooo:rsid="0029e783"/>
    </style:style>
    <style:style style:name="T3" style:family="text">
      <style:text-properties officeooo:rsid="002f249b"/>
    </style:style>
    <style:style style:name="T4" style:family="text">
      <style:text-properties officeooo:rsid="0031b75b"/>
    </style:style>
    <style:style style:name="T5" style:family="text">
      <style:text-properties officeooo:rsid="00335f33"/>
    </style:style>
    <style:style style:name="T6" style:family="text">
      <style:text-properties officeooo:rsid="0035195f"/>
    </style:style>
    <style:style style:name="T7" style:family="text">
      <style:text-properties officeooo:rsid="0036029b"/>
    </style:style>
    <style:style style:name="T8" style:family="text">
      <style:text-properties officeooo:rsid="0036869a"/>
    </style:style>
    <style:style style:name="T9" style:family="text">
      <style:text-properties officeooo:rsid="0037a995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f51f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7a995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385302" style:font-size-asian="16pt" style:font-size-complex="16pt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36f51f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37a995" style:font-size-asian="16pt" style:font-weight-asian="normal" style:font-size-complex="16pt" style:font-weight-complex="normal"/>
    </style:style>
    <style:style style:name="T18" style:family="text">
      <style:text-properties officeooo:rsid="003853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UDO MÉDICO-PERICIAL </text:p>
      <text:p text:style-name="P1"/>
      <text:p text:style-name="P2">EXCELENTÍSSIMO SR (A). DR (A) JUIZ (A) DE DIREITO DA VARA DO TRABALHO DE XXXXXX – XX.</text:p>
      <text:p text:style-name="P2"/>
      <text:p text:style-name="P9">DADOS DO PROCESSO:</text:p>
      <text:p text:style-name="P3"/>
      <text:p text:style-name="P3">AÇÃO CÍVIL PÚBLICA/AÇÃO INDIVIDUAL - </text:p>
      <text:p text:style-name="P3"/>
      <text:p text:style-name="P9">AUTOS: XXXXX</text:p>
      <text:p text:style-name="P9">AUTOR: XXXXXX</text:p>
      <text:p text:style-name="P9">RÉ<text:span text:style-name="T7">U</text:span>: XXXXXXX</text:p>
      <text:p text:style-name="P9"/>
      <text:p text:style-name="P10">PREÂMBULO </text:p>
      <text:p text:style-name="P10"><text:s/>Data, horário e local da realização do exame pericial. </text:p>
      <text:p text:style-name="P10"/>
      <text:p text:style-name="P4">APRESENTAÇÃO DO <text:span text:style-name="T7">PERITO </text:span></text:p>
      <text:p text:style-name="P4"/>
      <text:p text:style-name="P5">Excelentíssimo Senhor. Juiz do Trabalho da primeira Vara do Trabalho da cidade de XXXX</text:p>
      <text:p text:style-name="P11">eu Dr. XXX, CONSELHO DE CLASSE N.: XXXX, MINI CURRÍCULO, indicado como Assistente técnico pela reclamada XXX Ltda no processo de n. XXX, entre as partes: o autor XXX e a Ré XXXX Ltda, respeitosamente apresento o Parecer Técnico referente ao Laudo Pericial do processo citado.</text:p>
      <text:p text:style-name="P23"/>
      <text:p text:style-name="P20">Identificação do(s) assistente(s) técnico(s)</text:p>
      <text:p text:style-name="P11"/>
      <text:p text:style-name="P8">OBJETIVO <text:span text:style-name="T8">DO EXAME PERICIAL</text:span>:</text:p>
      <text:p text:style-name="P28">Orientação: Colocar o objetivo do <text:span text:style-name="T1">exame médico-pericial</text:span> que deve estar relacionado ao processo legal e ao caso concreto.</text:p>
      <text:p text:style-name="P6"/>
      <text:p text:style-name="P7">DOS FATOS ANALI<text:span text:style-name="T2">S</text:span>ADOS PELA ASSISTÊNCIA TÉCNICA:</text:p>
      <text:p text:style-name="P7"/>
      <text:p text:style-name="P12">Pleito do autor: </text:p>
      <text:p text:style-name="P12"/>
      <text:p text:style-name="P12">Alegação do pleito: </text:p>
      <text:p text:style-name="P12"/>
      <text:p text:style-name="P12"/>
      <text:p text:style-name="P13"><text:soft-page-break/>PROCEDIMENTOS PERICIAIS:</text:p>
      <text:p text:style-name="P27">Especificar os procedimentos utilizados para a realização do exame pericial </text:p>
      <text:p text:style-name="P13"/>
      <text:p text:style-name="P14">IDENTIFICAÇÃO <text:span text:style-name="T3">DO EXAMINADO: </text:span></text:p>
      <text:p text:style-name="P26">Data de nascimento Identidade Idade atual Estado civil Filhos Reside com Escolaridade </text:p>
      <text:p text:style-name="P14"/>
      <text:p text:style-name="P15">IDENTIFICAÇÃO DO AMBIENTE AVALIADO:</text:p>
      <text:p text:style-name="P25">Localização geográfica (cidade, bairro, endereço, estrutura predial, objetos, mobiliários ou maquinário presente, tipo de iluminação, de ventilação, etc. </text:p>
      <text:p text:style-name="P15"/>
      <text:p text:style-name="P16">Histórico ocupacional do examinado: </text:p>
      <text:p text:style-name="P16"/>
      <text:p text:style-name="P16">Histórico previdenciário <text:span text:style-name="T6">(quando for o caso)</text:span>: </text:p>
      <text:p text:style-name="P24">Afastado Sim/Não Desempregado <text:span text:style-name="T4">d</text:span>esde? <text:span text:style-name="T6">Tempo de contribuição,</text:span> Retorno <text:span text:style-name="T6">ao trabalho, etc?</text:span></text:p>
      <text:p text:style-name="P17"/>
      <text:p text:style-name="P17"><text:span text:style-name="T5">Histórico da doença atual:</text:span></text:p>
      <text:p text:style-name="P17"/>
      <text:p text:style-name="P17"><text:span text:style-name="T5">História patológica pregressa:</text:span></text:p>
      <text:p text:style-name="P17"/>
      <text:p text:style-name="P18">Exames complementares: </text:p>
      <text:p text:style-name="P18"/>
      <text:p text:style-name="P18">Relatórios médicos, atestados médicos, etc:</text:p>
      <text:p text:style-name="P17"/>
      <text:p text:style-name="P17"><text:span text:style-name="T5">Exame físico do examinado:</text:span></text:p>
      <text:p text:style-name="P17"/>
      <text:p text:style-name="P17"><text:span text:style-name="T5">Responder aos quesitos do juízo:</text:span></text:p>
      <text:p text:style-name="P17"/>
      <text:p text:style-name="P17"><text:span text:style-name="T5">Responder aos quesitos das partes: autor e réu.</text:span></text:p>
      <text:p text:style-name="P17"/>
      <text:p text:style-name="P19">Avaliação de documentos jurídicos, trabalhistas e previdenciários</text:p>
      <text:p text:style-name="P22"><text:span text:style-name="T6">Solicitar os documentos que julgar necessários para sua avaliação: </text:span>AET, PCMSO, PPRA, <text:span text:style-name="T6">PGR, LTCAT, APR, ASOs, </text:span>Ginástica Laboral, treinamentos ou outros (caso não tenham sido já enviados), apresentará também resultados de avaliações como: questionários de <text:s/>questionário de clima organizacional, <text:span text:style-name="T6">Controle de riscos psicossociais, </text:span>etc.</text:p>
      <text:p text:style-name="P21"><text:soft-page-break/>ELABORAÇÃO E CONCLUSÃO DO PARECER MÉDICO-PERICIAL</text:p>
      <text:p text:style-name="P29"><text:span text:style-name="T16">(Responder o mais claramente possível ao objetivo do exame pericial, especificando, quando for o caso, se há nexo causal entre a patologia e a atividade laborativa atual ou pregressa, se há incapacidade laborativa temporária, ou invalidez, caso seja questionado </text:span><text:span text:style-name="T17">(</text:span><text:span text:style-name="T15">A doença apresentada pelo autor é decorrente da atividade profissional por</text:span><text:span text:style-name="T13"> ele desempenhada (acidente de trabalho, doença profissional ou doença do trabalho), nos termos dos artigos 19 e 20 da Lei nº 8.213/91</text:span><text:span text:style-name="T14">)</text:span><text:span text:style-name="T13">.</text:span></text:p>
      <text:p text:style-name="P19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8T07:54:48.170000000</meta:creation-date>
    <dc:date>2026-05-18T09:45:53.574000000</dc:date>
    <meta:editing-duration>PT1H40M39S</meta:editing-duration>
    <meta:editing-cycles>27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39" meta:word-count="373" meta:character-count="2638" meta:non-whitespace-character-count="2285"/>
  </office:meta>
</office:document-meta>
</file>